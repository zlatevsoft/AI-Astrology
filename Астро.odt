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740D5C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Inter" svg:font-family="Inter, 'Inter Fallback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334155" style:font-name="Inter" fo:font-size="9pt" fo:letter-spacing="normal" fo:font-style="normal" fo:font-weight="normal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4155" style:font-name="Inter" fo:font-size="15pt" fo:letter-spacing="normal" fo:font-style="normal" fo:font-weight="normal"/>
    </style:style>
    <style:style style:name="P4" style:family="paragraph" style:parent-style-name="Heading_20_2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4155" style:font-name="Inter" fo:font-size="15pt" fo:letter-spacing="normal" fo:font-style="normal" fo:font-weight="normal"/>
    </style:style>
    <style:style style:name="T1" style:family="text">
      <style:text-properties fo:font-variant="normal" fo:text-transform="none" fo:color="#334155" style:font-name="Inter" fo:letter-spacing="normal" fo:font-style="normal" fo:font-weight="normal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Горе в логото <text:s/>пише:</text:p>
      <text:p text:style-name="Standard"/>
      <text:p text:style-name="Standard">“AI Astrology” смени го с:”Astro Horoscope”</text:p>
      <text:p text:style-name="P1"/>
      <text:p text:style-name="P1">Вместо: “Текстът „10 000+ генерирани карти“ да се смени с “ <text:s text:c="3"/>⭐ Любим избор на хиляди потребители”</text:p>
      <text:p text:style-name="P1"/>
      <text:p text:style-name="P1"/>
      <text:p text:style-name="P1">В контролната лента вместо “Защо AI astrology” да пише: “Какво получаваш”</text:p>
      <text:p text:style-name="P1"/>
      <text:p text:style-name="P1">В началната страница заглавието:“Избери <text:s/>своя астрологичен път <text:span text:style-name="T1">Открий космическия си почерк с AI анализ. Избери плана, който подхожда на твоето духовно пътешествие.” да се замени с: Заглавие</text:span></text:p>
      <text:p text:style-name="P2"/>
      <text:p text:style-name="P2">“Какво разкриват звездите за теб?”</text:p>
      <text:p text:style-name="P2"/>
      <text:p text:style-name="P2">Подзаглавие</text:p>
      <text:p text:style-name="P2"/>
      <text:p text:style-name="P2">“Получи персонална астрологична прогноза за любовта, характера и бъдещите възможности в живота ти!”</text:p>
      <text:p text:style-name="P2"/>
      <text:p text:style-name="P2">ПАКЕТ 1 </text:p>
      <text:p text:style-name="P2"/>
      <text:p text:style-name="P2">Заглавие</text:p>
      <text:p text:style-name="P2"/>
      <text:p text:style-name="P2">“Лична астрологична прогноза”</text:p>
      <text:p text:style-name="P2"/>
      <text:p text:style-name="P2">Подзаглавие</text:p>
      <text:p text:style-name="P2"/>
      <text:p text:style-name="P2">“Разбери какво разкриват звездите за твоя характер, любов и бъдещи възможности.”</text:p>
      <text:p text:style-name="P2"/>
      <text:p text:style-name="P2">Bullet points</text:p>
      <text:p text:style-name="P2"/>
      <text:p text:style-name="P2">“✔ Анализ на личността и силните страни</text:p>
      <text:p text:style-name="P2">✔ Любов и взаимоотношения</text:p>
      <text:p text:style-name="P2">✔ Кариера и житейски насоки</text:p>
      <text:p text:style-name="P2">✔ Скрит потенциал и таланти</text:p>
      <text:p text:style-name="P2">✔ Важни планетарни влияния</text:p>
      <text:p text:style-name="P2">✔ Персонален PDF доклад</text:p>
      <text:p text:style-name="P2">✔ Мигновен достъп след поръчка”</text:p>
      <text:p text:style-name="P2"/>
      <text:p text:style-name="P2">CTA бутон</text:p>
      <text:p text:style-name="P2"/>
      <text:p text:style-name="P2">“Вземи своята прогноза”</text:p>
      <text:p text:style-name="P2"/>
      <text:p text:style-name="P2">ПАКЕТ 2</text:p>
      <text:p text:style-name="P2"/>
      <text:p text:style-name="P2">Badge</text:p>
      <text:p text:style-name="P2"/>
      <text:p text:style-name="P2">“🔥 Най-поръчван избор’</text:p>
      <text:p text:style-name="P2"/>
      <text:p text:style-name="P2">Заглавие</text:p>
      <text:p text:style-name="P2"/>
      <text:p text:style-name="P2">“Премиум звезден анализ”</text:p>
      <text:p text:style-name="P2"/>
      <text:p text:style-name="P2">Подзаглавие</text:p>
      <text:p text:style-name="P2"/>
      <text:p text:style-name="P2">“Детайлен персонален анализ, който разкрива любовта, бъдещето и важните периоди в живота ти.”</text:p>
      <text:p text:style-name="P2"/>
      <text:p text:style-name="P2">Bullet points</text:p>
      <text:p text:style-name="P2"/>
      <text:p text:style-name="P2">“✔ Всичко от Основната прогноза</text:p>
      <text:p text:style-name="P2">✔ Подробен психологически профил</text:p>
      <text:p text:style-name="P2">✔ Любов, връзки и емоционални модели</text:p>
      <text:p text:style-name="P2">✔ Кариера и финансов потенциал</text:p>
      <text:p text:style-name="P2">✔ Предстоящи възможности и промени</text:p>
      <text:p text:style-name="P2">✔ Силни и слаби периоди</text:p>
      <text:p text:style-name="P2">✔ Анализ на житейски цикли</text:p>
      <text:p text:style-name="P2">✔ Персонални насоки и препоръки</text:p>
      <text:p text:style-name="P2"><text:soft-page-break/>✔ Premium PDF доклад</text:p>
      <text:p text:style-name="P2">✔ По-задълбочен и детайлен анализ”</text:p>
      <text:p text:style-name="P2"/>
      <text:p text:style-name="P2">Emotional line</text:p>
      <text:p text:style-name="P2"/>
      <text:p text:style-name="P2">“✨ Хиляди хора вече откриха нов поглед към живота си чрез своята прогноза.”</text:p>
      <text:p text:style-name="P2"/>
      <text:p text:style-name="P2">CTA бутон</text:p>
      <text:p text:style-name="P2"/>
      <text:p text:style-name="P2">“Разкрий какво ти предстои”</text:p>
      <text:p text:style-name="P2"/>
      <text:p text:style-name="P2">ПАКЕТ 3 </text:p>
      <text:p text:style-name="P2"/>
      <text:p text:style-name="P2">Заглавие</text:p>
      <text:p text:style-name="P2"/>
      <text:p text:style-name="P2">“Любовна съвместимост”</text:p>
      <text:p text:style-name="P2"/>
      <text:p text:style-name="P2">Подзаглавие</text:p>
      <text:p text:style-name="P2"/>
      <text:p text:style-name="P2">“Разбери истинската динамика между вас и какво показват звездите за връзката ви.”</text:p>
      <text:p text:style-name="P2"/>
      <text:p text:style-name="P2">Bullet points</text:p>
      <text:p text:style-name="P2"/>
      <text:p text:style-name="P2">“✔ Сравнение между две натални карти</text:p>
      <text:p text:style-name="P2">✔ Любовна и емоционална съвместимост</text:p>
      <text:p text:style-name="P2">✔ Комуникация и привличане</text:p>
      <text:p text:style-name="P2">✔ Силни страни на връзката</text:p>
      <text:p text:style-name="P2">✔ Потенциални конфликти</text:p>
      <text:p text:style-name="P2">✔ Дългосрочен потенциал</text:p>
      <text:p text:style-name="P2">✔ Подходящи периоди за развитие</text:p>
      <text:p text:style-name="P2">✔ Подробен PDF анализ “</text:p>
      <text:p text:style-name="P2"/>
      <text:p text:style-name="P2">Emotional line</text:p>
      <text:p text:style-name="P2"/>
      <text:p text:style-name="P2">“❤️ Научи какво ви свързва, какво ви разделя и какъв е потенциалът на връзката ви.”</text:p>
      <text:p text:style-name="P2"/>
      <text:p text:style-name="P2">CTA бутон</text:p>
      <text:p text:style-name="P2"/>
      <text:p text:style-name="P2">“Провери вашата съвместимост”</text:p>
      <text:p text:style-name="P3"/>
      <text:p text:style-name="P3"/>
      <text:p text:style-name="Standard"/>
      <text:p text:style-name="Standard"/>
      <text:p text:style-name="Standard">На база текстовете от следващата снимка да се извършат следните корекции:</text:p>
      <text:p text:style-name="Standard"><draw:frame draw:style-name="fr1" draw:name="Image1" text:anchor-type="char" svg:width="6.6929in" svg:height="3.7646in" draw:z-index="0"><draw:image xlink:href="Pictures/100000000000064000000384740D5CA2.png" xlink:type="simple" xlink:show="embed" xlink:actuate="onLoad"/></draw:frame><text:soft-page-break/></text:p>
      <text:p text:style-name="Standard"/>
      <text:p text:style-name="Standard">Този текст :“✨ Функции</text:p>
      <text:h text:style-name="P4" text:outline-level="2">Всичко необходимо<text:line-break/>за твоя астрологичен път</text:h>
      <text:p text:style-name="P5">Пълни възможности за точна натална карта, AI анализ и сигурност – на едно място.”</text:p>
      <text:p text:style-name="Standard"/>
      <text:p text:style-name="Standard">да се замени с: “Повече от обикновен хороскоп</text:p>
      <text:p text:style-name="Standard"/>
      <text:p text:style-name="Standard">Персонален анализ, създаден специално според твоите рождени данни и житейски периоди.”</text:p>
      <text:p text:style-name="Standard"/>
      <text:p text:style-name="Standard"/>
      <text:p text:style-name="Standard"/>
      <text:p text:style-name="Standard"/>
      <text:p text:style-name="Standard"/>
      <text:p text:style-name="Standard">Замени текста:</text:p>
      <text:p text:style-name="Standard"/>
      <text:p text:style-name="Standard">„Готови ли сте да видите своята натална карта?“ <text:s/>с” Разбери какво ти подготвят звездите!”</text:p>
      <text:p text:style-name="Standard"/>
      <text:p text:style-name="Standard">Бутона да бъде с текст: “Започни анализа”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Inter" svg:font-family="Inter, 'Inter Fallback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loext:hyphenation-keep-line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1665in" fo:margin-bottom="0.0835in"/>
      <style:text-properties style:font-name="Liberation Serif" fo:font-size="24pt" fo:font-weight="bold" style:font-name-asian="Songti SC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139in" fo:margin-bottom="0.0835in"/>
      <style:text-properties style:font-name="Liberation Serif" fo:font-size="18pt" fo:font-weight="bold" style:font-name-asian="Songti SC" style:font-size-asian="18pt" style:font-weight-asian="bold" style:font-name-complex="Arial Unicode MS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5-23T16:25:53.846776000</meta:creation-date>
    <dc:date>2026-05-24T10:47:02.20</dc:date>
    <meta:editing-duration>PT21M55S</meta:editing-duration>
    <meta:editing-cycles>6</meta:editing-cycles>
    <meta:generator>OpenOffice/4.1.14$Win32 OpenOffice.org_project/4114m1$Build-9811</meta:generator>
    <dc:creator>Ivan Zlatev</dc:creator>
    <meta:document-statistic meta:table-count="0" meta:image-count="1" meta:object-count="0" meta:page-count="3" meta:paragraph-count="72" meta:word-count="410" meta:character-count="2549"/>
  </office:meta>
</office:document-meta>
</file>